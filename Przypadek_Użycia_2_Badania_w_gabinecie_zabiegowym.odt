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18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a2.B1" style:family="table-cell">
      <style:table-cell-properties fo:padding="0.097cm" fo:border="0.018cm solid #000000"/>
    </style:style>
    <style:style style:name="Tabela2.A2" style:family="table-cell">
      <style:table-cell-properties fo:padding="0.097cm" fo:border-left="0.018cm solid #000000" fo:border-right="none" fo:border-top="none" fo:border-bottom="0.018cm solid #000000"/>
    </style:style>
    <style:style style:name="Tabela2.B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ela2.3" style:family="table-row">
      <style:table-row-properties style:min-row-height="0.787cm"/>
    </style:style>
    <style:style style:name="Tabela2.8" style:family="table-row">
      <style:table-row-properties style:min-row-height="4.651cm"/>
    </style:style>
    <style:style style:name="P1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 style:list-style-name="L1">
      <style:paragraph-properties fo:text-align="justify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 style:list-style-name="L1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 style:list-style-name="L11"/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 style:list-style-name="L29"/>
    <style:style style:name="P15" style:family="paragraph" style:parent-style-name="Text_20_body" style:list-style-name="L30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2. Badania w gabinecie zabiegowym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Poziom ważności</text:p>
          </table:table-cell>
          <table:table-cell table:style-name="Tabela2.B1" office:value-type="string">
            <text:p text:style-name="P2">Wysoki</text:p>
          </table:table-cell>
        </table:table-row>
        <table:table-row>
          <table:table-cell table:style-name="Tabela2.A2" office:value-type="string">
            <text:p text:style-name="P2">Typ przypadku użycia</text:p>
          </table:table-cell>
          <table:table-cell table:style-name="Tabela2.B2" office:value-type="string">
            <text:list xml:id="list4479336183849435395" text:style-name="L1">
              <text:list-header>
                <text:p text:style-name="P6">Szczegółowy, Niezbędny</text:p>
              </text:list-header>
            </text:list>
          </table:table-cell>
        </table:table-row>
        <table:table-row table:style-name="Tabela2.3">
          <table:table-cell table:style-name="Tabela2.A2" office:value-type="string">
            <text:p text:style-name="P2">Aktorzy</text:p>
          </table:table-cell>
          <table:table-cell table:style-name="Tabela2.B2" office:value-type="string">
            <text:list xml:id="list33695730" text:continue-numbering="true" text:style-name="L1">
              <text:list-item>
                <text:p text:style-name="P8">Pielęgniarka</text:p>
              </text:list-item>
            </text:list>
          </table:table-cell>
        </table:table-row>
        <table:table-row>
          <table:table-cell table:style-name="Tabela2.A2" office:value-type="string">
            <text:p text:style-name="P2">Krótki opis</text:p>
          </table:table-cell>
          <table:table-cell table:style-name="Tabela2.B2" office:value-type="string">
            <text:p text:style-name="P3">Przeprowadzenie badań diagnostycznych lub zabiegów pielęgniarskich oraz odnotowanie ich wyników w systemie medycznym. </text:p>
          </table:table-cell>
        </table:table-row>
        <table:table-row>
          <table:table-cell table:style-name="Tabela2.A2" office:value-type="string">
            <text:p text:style-name="P2">Warunki wstępne</text:p>
          </table:table-cell>
          <table:table-cell table:style-name="Tabela2.B2" office:value-type="string">
            <text:p text:style-name="P10">-Pacjent został skierowany na badanie lub zgłosił się zgodnie z harmonogramem.</text:p>
            <text:p text:style-name="P10">-Dostępny jest odpowiedni sprzęt oraz środki medyczne.</text:p>
            <text:p text:style-name="P4"/>
          </table:table-cell>
        </table:table-row>
        <table:table-row>
          <table:table-cell table:style-name="Tabela2.A2" office:value-type="string">
            <text:p text:style-name="P2">Warunki końcowe</text:p>
            <text:p text:style-name="P2"/>
          </table:table-cell>
          <table:table-cell table:style-name="Tabela2.B2" office:value-type="string">
            <text:p text:style-name="P10">-Badanie lub zabieg został wykonany.</text:p>
            <text:p text:style-name="P10">-Wyniki oraz informacje o przebiegu zostały zapisane w bazie danych.</text:p>
            <text:p text:style-name="P4"/>
          </table:table-cell>
        </table:table-row>
        <table:table-row>
          <table:table-cell table:style-name="Tabela2.A2" office:value-type="string">
            <text:p text:style-name="P2">Główny przepływ zdarzeń</text:p>
          </table:table-cell>
          <table:table-cell table:style-name="Tabela2.B2" office:value-type="string">
            <text:p text:style-name="P12">1,Pielęgniarka weryfikuje tożsamość pacjenta oraz cel wizyty.</text:p>
            <text:p text:style-name="P12">2.Przygotowuje stanowisko oraz niezbędny sprzęt do badania lub zabiegu.</text:p>
            <text:p text:style-name="P12">3.Przeprowadza badanie (np. pomiar ciśnienia, pobranie krwi, EKG, iniekcja).</text:p>
            <text:p text:style-name="P12">4.Ocenia stan pacjenta po wykonaniu czynności.</text:p>
            <text:p text:style-name="P12">5.Wprowadza wyniki badań oraz informacje o przebiegu do bazy danych.</text:p>
            <text:p text:style-name="P3"/>
          </table:table-cell>
        </table:table-row>
        <table:table-row table:style-name="Tabela2.8">
          <table:table-cell table:style-name="Tabela2.A2" office:value-type="string">
            <text:p text:style-name="P2">Alternatywny przepływy zdarzeń</text:p>
          </table:table-cell>
          <table:table-cell table:style-name="Tabela2.B2" office:value-type="string">
            <text:p text:style-name="P12">-Jeśli podczas badania wystąpią niepokojące objawy, pielęgniarka informuje lekarza i przekazuje pacjenta do dalszej diagnostyki.</text:p>
            <text:p text:style-name="P12">-Jeśli badanie wymaga dodatkowych materiałów lub sprzętu, pielęgniarka wstrzymuje procedurę do czasu ich przygotowania lub zleca wykonanie badania w innej placówce.</text:p>
            <text:p text:style-name="P3"/>
          </table:table-cell>
        </table:table-row>
        <table:table-row>
          <table:table-cell table:style-name="Tabela2.A2" office:value-type="string">
            <text:p text:style-name="P2">Wyjątki w przepływach</text:p>
          </table:table-cell>
          <table:table-cell table:style-name="Tabela2.B2" office:value-type="string">
            <text:p text:style-name="P13">-Błąd weryfikacji danych pacjenta.</text:p>
            <text:list xml:id="list3766113171044390155" text:style-name="L29">
              <text:list-header>
                <text:p text:style-name="P14"><text:soft-page-break/>-Brak możliwości wykonania badania z powodu złego stanu pacjenta lub awarii sprzętu.</text:p>
              </text:list-header>
            </text:list>
            <text:list xml:id="list1188129519019099720" text:style-name="L30">
              <text:list-header>
                <text:p text:style-name="P15">-Nieprawidłowe lub niekompletne dane wprowadzane do systemu.</text:p>
              </text:list-header>
            </text:list>
            <text:p text:style-name="P2"/>
          </table:table-cell>
        </table:table-row>
        <table:table-row>
          <table:table-cell table:style-name="Tabela2.A2" office:value-type="string">
            <text:p text:style-name="P2">Specjalne wymagania</text:p>
          </table:table-cell>
          <table:table-cell table:style-name="Tabela2.B2" office:value-type="string">
            <text:p text:style-name="P2">brak</text:p>
          </table:table-cell>
        </table:table-row>
        <table:table-row>
          <table:table-cell table:style-name="Tabela2.A2" office:value-type="string">
            <text:p text:style-name="P2">Notatki i kwestie</text:p>
          </table:table-cell>
          <table:table-cell table:style-name="Tabela2.B2" office:value-type="string">
            <text:p text:style-name="P2">brak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loext:hyphenation-keep-type="column" loext:hyphenation-keep-line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25T13:45:53.123000000</meta:creation-date>
    <dc:date>2026-05-20T13:42:37.41</dc:date>
    <meta:editing-duration>PT56M59S</meta:editing-duration>
    <meta:editing-cycles>5</meta:editing-cycles>
    <meta:generator>OpenOffice/4.1.15$Win32 OpenOffice.org_project/4115m2$Build-9813</meta:generator>
    <dc:creator>A S</dc:creator>
    <meta:document-statistic meta:table-count="2" meta:image-count="0" meta:object-count="0" meta:page-count="2" meta:paragraph-count="32" meta:word-count="187" meta:character-count="1424"/>
  </office:meta>
</office:document-meta>
</file>